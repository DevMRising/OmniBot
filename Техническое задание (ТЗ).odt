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1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3" style:family="paragraph" style:parent-style-name="Standard" style:list-style-name="WW8Num1">
      <style:paragraph-properties fo:margin-left="0.6252in" fo:margin-right="0in" fo:text-align="justify" style:justify-single-word="false" fo:text-indent="-0.25in" style:auto-text-indent="false">
        <style:tab-stops>
          <style:tab-stop style:position="0.6252in"/>
        </style:tab-stops>
      </style:paragraph-properties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на практику</text:p>
      <text:p text:style-name="P1">тема: «Имитационная модель <text:span text:style-name="T1">Omnibot в </text:span>робототехническом симуляторе <text:span text:style-name="T1">CoppeliaSim</text:span>»</text:p>
      <text:p text:style-name="P1"/>
      <text:list text:style-name="WW8Num1">
        <text:list-item>
          <text:p text:style-name="P2">Используя CAD-модель Omnibot сконструировать имитационную модель в среде CoppeliaSim;</text:p>
        </text:list-item>
        <text:list-item>
          <text:p text:style-name="P2">С помощью элемента <text:span text:style-name="T1">Path</text:span> в среде <text:span text:style-name="T1">CoppeliaSim </text:span>создать<text:span text:style-name="T1"> </text:span>путь<text:span text:style-name="T1"> </text:span>движение мобильного робота;</text:p>
        </text:list-item>
        <text:list-item>
          <text:p text:style-name="P2">Разработать программное обеспечение имитационной модели Omnibot со следующим функционалом:</text:p>
          <text:list>
            <text:list-item>
              <text:p text:style-name="P3">В режиме «Симуляция» должен формироваться массив векторов движения Omnibot;</text:p>
            </text:list-item>
            <text:list-item>
              <text:p text:style-name="P3">По завершению работы имитационной модели в режиме «Симуляция» результаты генерации управляющих векторов движения посредством <text:span text:style-name="T1">TCP-</text:span>сокета должны загружаться в память мобильного робота;</text:p>
            </text:list-item>
            <text:list-item>
              <text:p text:style-name="P3">При запуске имитационной модели в режиме «Реальное время» посредством протокола <text:span text:style-name="T1">UDP</text:span> на робот должен быть отправлен сигнал начала выполнения ранее загруженного задания;</text:p>
            </text:list-item>
            <text:list-item>
              <text:p text:style-name="P3">В процессе работы <text:span text:style-name="T1">CoppeliaSim в </text:span>режиме<text:span text:style-name="T1"> </text:span>«Реальное время» посредством протокола <text:span text:style-name="T1">UDP</text:span> на робот необходимо регулярно отправлять текущий вектор движения имитационной модели;</text:p>
            </text:list-item>
            <text:list-item>
              <text:p text:style-name="P3">При паузе или остановке в работе имитационной модели в режиме «Реальное время» робот Omnibot должен получить соответствующие сигналы и приостановить выполнение задания или завершить его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5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Задание на практику</dc:title>
    <dc:subject/>
    <meta:keyword/>
    <dc:description/>
    <meta:initial-creator>DAV</meta:initial-creator>
    <meta:creation-date>2026-05-12T11:01:00</meta:creation-date>
    <dc:creator>DAV</dc:creator>
    <dc:date>2026-05-12T11:42:00</dc:date>
    <meta:editing-cycles>3</meta:editing-cycles>
    <meta:editing-duration>PT42M</meta:editing-duration>
    <meta:document-statistic meta:table-count="0" meta:image-count="0" meta:object-count="0" meta:page-count="1" meta:paragraph-count="10" meta:word-count="147" meta:character-count="1144" meta:non-whitespace-character-count="1015"/>
    <meta:generator>LibreOffice/25.8.7.3$Linux_X86_64 LibreOffice_project/580$Build-3</meta:generator>
  </office:meta>
</office:document-meta>
</file>